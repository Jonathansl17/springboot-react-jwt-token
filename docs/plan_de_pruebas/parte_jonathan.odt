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F0000026D53D12862.png" manifest:media-type="image/png"/>
  <manifest:file-entry manifest:full-path="Pictures/10000001000004AA00000221453CB80F.png" manifest:media-type="image/png"/>
  <manifest:file-entry manifest:full-path="Pictures/10000001000004A80000026F8F83D7B7.png" manifest:media-type="image/png"/>
  <manifest:file-entry manifest:full-path="Pictures/10000001000003530000020073FE362D.png" manifest:media-type="image/png"/>
  <manifest:file-entry manifest:full-path="Pictures/10000001000004AF000001EFC707438C.png" manifest:media-type="image/png"/>
  <manifest:file-entry manifest:full-path="Pictures/10000001000000F50000002BCF3F3D35.png" manifest:media-type="image/png"/>
  <manifest:file-entry manifest:full-path="Pictures/100000010000010A00000031F2E7FC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9a84" officeooo:paragraph-rsid="000b9a84"/>
    </style:style>
    <style:style style:name="P2" style:family="paragraph" style:parent-style-name="Standard">
      <style:text-properties officeooo:rsid="000cf861" officeooo:paragraph-rsid="000cf861"/>
    </style:style>
    <style:style style:name="P3" style:family="paragraph" style:parent-style-name="Standard">
      <style:text-properties officeooo:rsid="000e2558" officeooo:paragraph-rsid="000e2558"/>
    </style:style>
    <style:style style:name="P4" style:family="paragraph" style:parent-style-name="Standard">
      <style:text-properties officeooo:rsid="000b9a84" officeooo:paragraph-rsid="000e2558"/>
    </style:style>
    <style:style style:name="P5" style:family="paragraph" style:parent-style-name="Standard">
      <style:text-properties officeooo:rsid="000cf861" officeooo:paragraph-rsid="000e2558"/>
    </style:style>
    <style:style style:name="P6" style:family="paragraph" style:parent-style-name="Standard">
      <style:text-properties officeooo:rsid="0011d28e" officeooo:paragraph-rsid="0011d28e"/>
    </style:style>
    <style:style style:name="P7" style:family="paragraph" style:parent-style-name="Standard">
      <style:text-properties officeooo:rsid="000b9a84" officeooo:paragraph-rsid="0016e0cf"/>
    </style:style>
    <style:style style:name="P8" style:family="paragraph" style:parent-style-name="Standard">
      <style:text-properties officeooo:rsid="000cf861" officeooo:paragraph-rsid="0016e0cf"/>
    </style:style>
    <style:style style:name="P9" style:family="paragraph" style:parent-style-name="Standard">
      <style:text-properties officeooo:rsid="000e2558" officeooo:paragraph-rsid="00213126"/>
    </style:style>
    <style:style style:name="P10" style:family="paragraph" style:parent-style-name="Standard">
      <style:text-properties officeooo:rsid="000cf861" officeooo:paragraph-rsid="001d85f3"/>
    </style:style>
    <style:style style:name="P11" style:family="paragraph" style:parent-style-name="Standard">
      <style:text-properties officeooo:rsid="0011d28e" officeooo:paragraph-rsid="001e5799"/>
    </style:style>
    <style:style style:name="P12" style:family="paragraph" style:parent-style-name="Standard">
      <style:text-properties officeooo:rsid="000cf861" officeooo:paragraph-rsid="001e5799"/>
    </style:style>
    <style:style style:name="P13" style:family="paragraph" style:parent-style-name="Standard">
      <style:text-properties officeooo:rsid="000b9a84" officeooo:paragraph-rsid="00213126"/>
    </style:style>
    <style:style style:name="P14" style:family="paragraph" style:parent-style-name="Standard">
      <style:text-properties officeooo:rsid="000cf861" officeooo:paragraph-rsid="00213126"/>
    </style:style>
    <style:style style:name="P15" style:family="paragraph" style:parent-style-name="Standard">
      <style:text-properties officeooo:rsid="0011d28e" officeooo:paragraph-rsid="00213126"/>
    </style:style>
    <style:style style:name="T1" style:family="text">
      <style:text-properties officeooo:rsid="0014bf46"/>
    </style:style>
    <style:style style:name="T2" style:family="text">
      <style:text-properties officeooo:rsid="001013c0"/>
    </style:style>
    <style:style style:name="T3" style:family="text">
      <style:text-properties officeooo:rsid="0011d28e"/>
    </style:style>
    <style:style style:name="T4" style:family="text">
      <style:text-properties officeooo:rsid="00213126"/>
    </style:style>
    <style:style style:name="T5" style:family="text">
      <style:text-properties officeooo:rsid="000cf861"/>
    </style:style>
    <style:style style:name="T6" style:family="text">
      <style:text-properties officeooo:rsid="001fd118"/>
    </style:style>
    <style:style style:name="T7" style:family="text">
      <style:text-properties officeooo:rsid="00137b97"/>
    </style:style>
    <style:style style:name="T8" style:family="text">
      <style:text-properties officeooo:rsid="001e5799"/>
    </style:style>
    <style:style style:name="T9" style:family="text">
      <style:text-properties officeooo:rsid="0016e0cf"/>
    </style:style>
    <style:style style:name="T10" style:family="text">
      <style:text-properties officeooo:rsid="001b33ac"/>
    </style:style>
    <style:style style:name="T11" style:family="text">
      <style:text-properties officeooo:rsid="001c8ada"/>
    </style:style>
    <style:style style:name="T12" style:family="text">
      <style:text-properties officeooo:rsid="001d85f3"/>
    </style:style>
    <style:style style:name="T13" style:family="text">
      <style:text-properties officeooo:rsid="001f1da0"/>
    </style:style>
    <style:style style:name="T14" style:family="text">
      <style:text-properties officeooo:rsid="001fd3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-46: Redireccion a login sin sesion activa</text:p>
      <text:p text:style-name="P2"/>
      <text:p text:style-name="P2">Tipo: Funcional</text:p>
      <text:p text:style-name="P3">Herramientas: Navegador en ventana privada</text:p>
      <text:p text:style-name="P2"/>
      <text:p text:style-name="P2">Precondiciones: Usuario no autenticado, sin token en localsStorage</text:p>
      <text:p text:style-name="P2"/>
      <text:p text:style-name="P2">Datos de entrada: Urls /userpage y /adminpage</text:p>
      <text:p text:style-name="P2"/>
      <text:p text:style-name="P2">Pasos:</text:p>
      <text:p text:style-name="P2"><text:tab/>1. Abrir navegador en ventana privada</text:p>
      <text:p text:style-name="P2"><text:tab/>2. Navegar a http://localhost:3000/userpage</text:p>
      <text:p text:style-name="P2"><text:tab/>3. <text:a xlink:type="simple" xlink:href="http://localhost:3000/adminpage" text:style-name="Internet_20_link" text:visited-style-name="Visited_20_Internet_20_Link">http://localhost:3000/adminpage</text:a></text:p>
      <text:p text:style-name="P2"/>
      <text:p text:style-name="P2">Resultado esperado: En ambos casos redireccion a /login</text:p>
      <text:p text:style-name="P2">Resultado obtenido: Ambas URLs redirigen a /login</text:p>
      <text:p text:style-name="P2">Estado: <text:span text:style-name="T1">Pasa</text:span></text:p>
      <text:p text:style-name="P1"/>
      <text:p text:style-name="P2">Evidencia:</text:p>
      <text:p text:style-name="P1"><draw:frame draw:style-name="fr1" draw:name="Image1" text:anchor-type="char" svg:x="0.0457in" svg:y="0.1299in" svg:width="2.7709in" svg:height="0.5102in" draw:z-index="0"><draw:image xlink:href="Pictures/100000010000010A00000031F2E7FC7B.png" xlink:type="simple" xlink:show="embed" xlink:actuate="onLoad" draw:mime-type="image/png"/></draw:frame><draw:frame draw:style-name="fr1" draw:name="Image3" text:anchor-type="char" svg:x="3.0118in" svg:y="0.1291in" svg:width="2.8055in" svg:height="0.4925in" draw:z-index="2"><draw:image xlink:href="Pictures/10000001000000F50000002BCF3F3D35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" text:anchor-type="char" svg:x="0.0437in" svg:y="0.0055in" svg:width="5.6252in" svg:height="3.1173in" draw:z-index="1"><draw:image xlink:href="Pictures/10000001000003530000020073FE36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C-<text:span text:style-name="T2">47</text:span>: <text:span text:style-name="T2">Usuario regular solo ve sus pedidos</text:span></text:p>
      <text:p text:style-name="P5"/>
      <text:p text:style-name="P5">Tipo: Funcional / <text:span text:style-name="T3">Autorizacion</text:span></text:p>
      <text:p text:style-name="P3">Herramientas: Postman <text:span text:style-name="T3">(coleccion `TC46-58 Validaciones y Seguridad.postman_collection.json`</text:span><text:span text:style-name="T4">)</text:span></text:p>
      <text:p text:style-name="P5"/>
      <text:p text:style-name="P5">Precondiciones: <text:span text:style-name="T2">Coleccion importada en postman y los setups de la coleccion ejecutados </text:span><text:span text:style-name="T3">para ge</text:span><text:span text:style-name="T4">n</text:span><text:span text:style-name="T3">erar el ‘userToken’ y ‘adminToken’</text:span></text:p>
      <text:p text:style-name="P5"/>
      <text:p text:style-name="P5">Datos de entrada: ‘<text:span text:style-name="T2">userToken’ valido</text:span></text:p>
      <text:p text:style-name="P5"/>
      <text:p text:style-name="P5">Pasos:</text:p>
      <text:p text:style-name="P5"><text:tab/>1. <text:span text:style-name="T3">Abrir la coleccion en postman</text:span></text:p>
      <text:p text:style-name="P5"><text:tab/>2. <text:span text:style-name="T3">Ejecutar los 3 primeros request que empiezan con SETUP en orde</text:span></text:p>
      <text:p text:style-name="P5"><text:tab/>3. <text:span text:style-name="T3">Ejecutar ‘TC47a - GET /api/users/me</text:span></text:p>
      <text:p text:style-name="P6"><text:tab/>4<text:span text:style-name="T5">. </text:span>Ejecutar ‘TC47b - GET /api/users/me </text:p>
      <text:p text:style-name="P5"/>
      <text:p text:style-name="P5">Resultado esperado: <text:span text:style-name="T6">El paso 3 </text:span><text:span text:style-name="T7">deberia de retornar un codigo http “200 </text:span><text:span text:style-name="T8">OK”</text:span><text:span text:style-name="T7"> con orders del propio usuario y el </text:span><text:span text:style-name="T6">paso 4 </text:span><text:span text:style-name="T7">deberia de retornar un codigo http “403 </text:span><text:span text:style-name="T8">Forbidden”</text:span><text:span text:style-name="T7"> rechazando el intento de obtener ordenes de otro usuario</text:span></text:p>
      <text:p text:style-name="P5"><text:tab/><text:tab/><text:tab/></text:p>
      <text:p text:style-name="P5">Resultado obtenido: <text:span text:style-name="T4">Se retornan los codigos http esperados y solo el usuario al que le pertenecen las ordenes puede verlas</text:span></text:p>
      <text:p text:style-name="P5">Estado: <text:span text:style-name="T7">Pasa</text:span></text:p>
      <text:p text:style-name="P4"/>
      <text:p text:style-name="P5">Evidencia:</text:p>
      <text:p text:style-name="P5"><draw:frame draw:style-name="fr2" draw:name="Image6" text:anchor-type="char" svg:width="6.9252in" svg:height="3.6189in" draw:z-index="3"><draw:image xlink:href="Pictures/10000001000004A80000026F8F83D7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<text:soft-page-break/></text:p>
      <text:p text:style-name="P7"/>
      <text:p text:style-name="P7"><draw:frame draw:style-name="fr2" draw:name="Image4" text:anchor-type="char" svg:width="6.9252in" svg:height="2.8583in" draw:z-index="4"><draw:image xlink:href="Pictures/10000001000004AF000001EFC707438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C-<text:span text:style-name="T2">4</text:span><text:span text:style-name="T9">8</text:span>: <text:span text:style-name="T4">Datos guardados correctamente al crear pedido</text:span></text:p>
      <text:p text:style-name="P7"/>
      <text:p text:style-name="P8">Tipo: Funcional</text:p>
      <text:p text:style-name="P9">Herramientas: Postman <text:span text:style-name="T3">(coleccion `TC46-58 Validaciones y Seguridad.postman_collection.json`</text:span><text:span text:style-name="T4">)</text:span> </text:p>
      <text:p text:style-name="P8"/>
      <text:p text:style-name="P8">Precondiciones: <text:span text:style-name="T10">S</text:span><text:span text:style-name="T2">etups de la coleccion ejecutados </text:span><text:span text:style-name="T3">para ge</text:span><text:span text:style-name="T4">n</text:span><text:span text:style-name="T3">erar el ‘userToken’ <text:s/></text:span><text:span text:style-name="T11">valido</text:span></text:p>
      <text:p text:style-name="P8"/>
      <text:p text:style-name="P8">Datos de entrada: <text:span text:style-name="T10">body: {“description”:”Pedido TC48 -- {{$timestamp}” }</text:span></text:p>
      <text:p text:style-name="P8"/>
      <text:p text:style-name="P8">Pasos:</text:p>
      <text:p text:style-name="P10"><text:tab/><text:span text:style-name="T12">1</text:span>. <text:span text:style-name="T3">Ejecutar ‘TC47</text:span><text:span text:style-name="T12">8</text:span><text:span text:style-name="T3"> - </text:span><text:span text:style-name="T12">POST</text:span><text:span text:style-name="T3"> /api/</text:span><text:span text:style-name="T12">orders</text:span></text:p>
      <text:p text:style-name="P11"><text:tab/><text:span text:style-name="T12">2</text:span><text:span text:style-name="T5">. </text:span>Ejecutar ‘TC47<text:span text:style-name="T13">a</text:span> - GET /api/users/me <text:span text:style-name="T12">y verificar que el pedido aparezca</text:span> </text:p>
      <text:p text:style-name="P8"/>
      <text:p text:style-name="P12">Resultado esperado: <text:span text:style-name="T6">El paso 1 </text:span><text:span text:style-name="T7">deberia de retornar un codigo http “</text:span><text:span text:style-name="T6">201 Created</text:span><text:span text:style-name="T7">” </text:span><text:span text:style-name="T6">con id, description y createdAT y e</text:span><text:span text:style-name="T14">n el paso 2 se podria de visualizar el pedido que acababamos de crear</text:span></text:p>
      <text:p text:style-name="P12"><text:tab/><text:tab/><text:tab/></text:p>
      <text:p text:style-name="P8">Resultado <text:span text:style-name="T4">Se retornas los codigos http esperados y se crean correctamente los pedidos </text:span></text:p>
      <text:p text:style-name="P8">Estado: <text:span text:style-name="T4">Pasa</text:span></text:p>
      <text:p text:style-name="P7"/>
      <text:p text:style-name="P8">Evidencia: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char" svg:x="0.0264in" svg:y="-0.5126in" svg:width="6.9252in" svg:height="3.1602in" draw:z-index="5"><draw:image xlink:href="Pictures/10000001000004AA00000221453CB80F.png" xlink:type="simple" xlink:show="embed" xlink:actuate="onLoad" draw:mime-type="image/png"/></draw:frame><draw:frame draw:style-name="fr1" draw:name="Image7" text:anchor-type="char" svg:x="0.0264in" svg:y="2.9075in" svg:width="6.9252in" svg:height="3.5862in" draw:z-index="6"><draw:image xlink:href="Pictures/10000001000004AF0000026D53D12862.png" xlink:type="simple" xlink:show="embed" xlink:actuate="onLoad" draw:mime-type="image/png"/></draw:frame></text:p>
      <text:p text:style-name="P13"/>
      <text:p text:style-name="P13"><text:soft-page-break/>TC-<text:span text:style-name="T2">4</text:span><text:span text:style-name="T9">8</text:span>: <text:span text:style-name="T4">Editar perfil y verificar persistencia</text:span></text:p>
      <text:p text:style-name="P13"/>
      <text:p text:style-name="P14">Tipo: Funcional</text:p>
      <text:p text:style-name="P9">Herramientas: Postman <text:span text:style-name="T3">(coleccion `TC46-58 Validaciones y Seguridad.postman_collection.json`</text:span><text:span text:style-name="T4">)</text:span></text:p>
      <text:p text:style-name="P14"/>
      <text:p text:style-name="P14">Precondiciones: <text:span text:style-name="T10">S</text:span><text:span text:style-name="T2">etups de la coleccion ejecutados </text:span><text:span text:style-name="T3">para ge</text:span><text:span text:style-name="T4">n</text:span><text:span text:style-name="T3">erar el ‘userToken’ <text:s/></text:span><text:span text:style-name="T11">valido</text:span></text:p>
      <text:p text:style-name="P14"/>
      <text:p text:style-name="P14">Datos de entrada: <text:span text:style-name="T10">body: {“description”:”Pedido TC48 -- {{$timestamp}” }</text:span></text:p>
      <text:p text:style-name="P14"/>
      <text:p text:style-name="P14">Pasos:</text:p>
      <text:p text:style-name="P14"><text:tab/><text:span text:style-name="T12">1</text:span>. <text:span text:style-name="T3">Ejecutar ‘TC47</text:span><text:span text:style-name="T12">8</text:span><text:span text:style-name="T3"> - </text:span><text:span text:style-name="T12">POST</text:span><text:span text:style-name="T3"> /api/</text:span><text:span text:style-name="T12">orders</text:span></text:p>
      <text:p text:style-name="P15"><text:tab/><text:span text:style-name="T12">2</text:span><text:span text:style-name="T5">. </text:span>Ejecutar ‘TC47<text:span text:style-name="T13">a</text:span> - GET /api/users/me <text:span text:style-name="T12">y verificar que el pedido aparezca</text:span> </text:p>
      <text:p text:style-name="P14"/>
      <text:p text:style-name="P14">Resultado esperado: <text:span text:style-name="T6">El paso 1 </text:span><text:span text:style-name="T7">deberia de retornar un codigo http “</text:span><text:span text:style-name="T6">201 Created</text:span><text:span text:style-name="T7">” </text:span><text:span text:style-name="T6">con id, description y createdAT y e</text:span><text:span text:style-name="T14">n el paso 2 se podria de visualizar el pedido que acababamos de crear</text:span></text:p>
      <text:p text:style-name="P14"><text:tab/><text:tab/><text:tab/></text:p>
      <text:p text:style-name="P14">Resultado <text:span text:style-name="T4">Se retornas los codigos http esperados y se crean correctamente los pedidos </text:span></text:p>
      <text:p text:style-name="P14">Estado: <text:span text:style-name="T4">Pasa</text:span></text:p>
      <text:p text:style-name="P13"/>
      <text:p text:style-name="P14">Evidencia: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09:08:11.661161894</meta:creation-date>
    <dc:date>2026-04-19T10:43:45.599570556</dc:date>
    <meta:editing-duration>PT1H14M47S</meta:editing-duration>
    <meta:editing-cycles>16</meta:editing-cycles>
    <meta:generator>LibreOffice/26.2.2.2$Linux_X86_64 LibreOffice_project/620$Build-2</meta:generator>
    <meta:document-statistic meta:table-count="0" meta:image-count="7" meta:object-count="0" meta:page-count="5" meta:paragraph-count="54" meta:word-count="401" meta:character-count="2794" meta:non-whitespace-character-count="2416"/>
  </office:meta>
</office:document-meta>
</file>